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3ce" officeooo:paragraph-rsid="00068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mission Assignment -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01:07:32.427928560</meta:creation-date>
    <meta:generator>LibreOffice/26.2.3.2$Linux_X86_64 LibreOffice_project/620$Build-2</meta:generator>
    <dc:date>2026-06-07T02:41:29.989496123</dc:date>
    <meta:editing-duration>PT41S</meta:editing-duration>
    <meta:editing-cycles>2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